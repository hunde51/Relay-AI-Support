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</style:style>
    <style:style style:name="P3" style:family="paragraph" style:parent-style-name="Preformatted_20_Text">
      <style:paragraph-properties fo:margin-top="0in" fo:margin-bottom="0.1965in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in" fo:margin-bottom="0in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in" fo:margin-bottom="0in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in" fo:margin-bottom="0in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4">
      <style:paragraph-properties fo:margin-top="0in" fo:margin-bottom="0in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 style:list-style-name="L5">
      <style:paragraph-properties fo:margin-top="0in" fo:margin-bottom="0in" style:contextual-spacing="false"/>
    </style:style>
    <style:style style:name="P14" style:family="paragraph" style:parent-style-name="Text_20_body" style:list-style-name="L6"/>
    <style:style style:name="P15" style:family="paragraph" style:parent-style-name="Text_20_body" style:list-style-name="L6">
      <style:paragraph-properties fo:margin-top="0in" fo:margin-bottom="0in" style:contextual-spacing="false"/>
    </style:style>
    <style:style style:name="P16" style:family="paragraph" style:parent-style-name="Text_20_body" style:list-style-name="L7"/>
    <style:style style:name="P17" style:family="paragraph" style:parent-style-name="Text_20_body" style:list-style-name="L7">
      <style:paragraph-properties fo:margin-top="0in" fo:margin-bottom="0in" style:contextual-spacing="false"/>
    </style:style>
    <style:style style:name="P18" style:family="paragraph" style:parent-style-name="Text_20_body" style:list-style-name="L8"/>
    <style:style style:name="P19" style:family="paragraph" style:parent-style-name="Text_20_body" style:list-style-name="L8">
      <style:paragraph-properties fo:margin-top="0in" fo:margin-bottom="0in" style:contextual-spacing="false"/>
    </style:style>
    <style:style style:name="P20" style:family="paragraph" style:parent-style-name="Text_20_body" style:list-style-name="L9"/>
    <style:style style:name="P21" style:family="paragraph" style:parent-style-name="Text_20_body" style:list-style-name="L9">
      <style:paragraph-properties fo:margin-top="0in" fo:margin-bottom="0in" style:contextual-spacing="false"/>
    </style:style>
    <style:style style:name="P22" style:family="paragraph" style:parent-style-name="Text_20_body" style:list-style-name="L10"/>
    <style:style style:name="P23" style:family="paragraph" style:parent-style-name="Text_20_body" style:list-style-name="L10">
      <style:paragraph-properties fo:margin-top="0in" fo:margin-bottom="0in" style:contextual-spacing="false"/>
    </style:style>
    <style:style style:name="P24" style:family="paragraph" style:parent-style-name="Text_20_body" style:list-style-name="L11"/>
    <style:style style:name="P25" style:family="paragraph" style:parent-style-name="Text_20_body" style:list-style-name="L11">
      <style:paragraph-properties fo:margin-top="0in" fo:margin-bottom="0in" style:contextual-spacing="false"/>
    </style:style>
    <style:style style:name="P26" style:family="paragraph" style:parent-style-name="Text_20_body" style:list-style-name="L12"/>
    <style:style style:name="P27" style:family="paragraph" style:parent-style-name="Text_20_body" style:list-style-name="L13"/>
    <style:style style:name="P28" style:family="paragraph" style:parent-style-name="Text_20_body" style:list-style-name="L13">
      <style:paragraph-properties fo:margin-top="0in" fo:margin-bottom="0in" style:contextual-spacing="false"/>
    </style:style>
    <style:style style:name="P29" style:family="paragraph" style:parent-style-name="Text_20_body" style:list-style-name="L14"/>
    <style:style style:name="P30" style:family="paragraph" style:parent-style-name="Text_20_body" style:list-style-name="L14">
      <style:paragraph-properties fo:margin-top="0in" fo:margin-bottom="0in" style:contextual-spacing="false"/>
    </style:style>
    <style:style style:name="P31" style:family="paragraph" style:parent-style-name="Text_20_body" style:list-style-name="L15"/>
    <style:style style:name="P32" style:family="paragraph" style:parent-style-name="Text_20_body" style:list-style-name="L16"/>
    <style:style style:name="P33" style:family="paragraph" style:parent-style-name="Text_20_body" style:list-style-name="L16">
      <style:paragraph-properties fo:margin-top="0in" fo:margin-bottom="0in" style:contextual-spacing="false"/>
    </style:style>
    <style:style style:name="P34" style:family="paragraph" style:parent-style-name="Text_20_body" style:list-style-name="L17"/>
    <style:style style:name="P35" style:family="paragraph" style:parent-style-name="Text_20_body" style:list-style-name="L17">
      <style:paragraph-properties fo:margin-top="0in" fo:margin-bottom="0in" style:contextual-spacing="false"/>
    </style:style>
    <style:style style:name="P36" style:family="paragraph" style:parent-style-name="Text_20_body" style:list-style-name="L18"/>
    <style:style style:name="P37" style:family="paragraph" style:parent-style-name="Text_20_body" style:list-style-name="L18">
      <style:paragraph-properties fo:margin-top="0in" fo:margin-bottom="0in" style:contextual-spacing="false"/>
    </style:style>
    <style:style style:name="P38" style:family="paragraph" style:parent-style-name="Text_20_body" style:list-style-name="L19"/>
    <style:style style:name="P39" style:family="paragraph" style:parent-style-name="Text_20_body" style:list-style-name="L20"/>
    <style:style style:name="P40" style:family="paragraph" style:parent-style-name="Text_20_body" style:list-style-name="L20">
      <style:paragraph-properties fo:margin-top="0in" fo:margin-bottom="0in" style:contextual-spacing="false"/>
    </style:style>
    <style:style style:name="P41" style:family="paragraph" style:parent-style-name="Text_20_body" style:list-style-name="L21"/>
    <style:style style:name="P42" style:family="paragraph" style:parent-style-name="Text_20_body" style:list-style-name="L21">
      <style:paragraph-properties fo:margin-top="0in" fo:margin-bottom="0in" style:contextual-spacing="false"/>
    </style:style>
    <style:style style:name="P43" style:family="paragraph" style:parent-style-name="Text_20_body" style:list-style-name="L22"/>
    <style:style style:name="P44" style:family="paragraph" style:parent-style-name="Text_20_body" style:list-style-name="L22">
      <style:paragraph-properties fo:margin-top="0in" fo:margin-bottom="0in" style:contextual-spacing="false"/>
    </style:style>
    <style:style style:name="P45" style:family="paragraph" style:parent-style-name="Text_20_body" style:list-style-name="L23"/>
    <style:style style:name="P46" style:family="paragraph" style:parent-style-name="Text_20_body" style:list-style-name="L24"/>
    <style:style style:name="P47" style:family="paragraph" style:parent-style-name="Text_20_body" style:list-style-name="L24">
      <style:paragraph-properties fo:margin-top="0in" fo:margin-bottom="0in" style:contextual-spacing="false"/>
    </style:style>
    <style:style style:name="P48" style:family="paragraph" style:parent-style-name="Text_20_body" style:list-style-name="L25"/>
    <style:style style:name="P49" style:family="paragraph" style:parent-style-name="Text_20_body" style:list-style-name="L25">
      <style:paragraph-properties fo:margin-top="0in" fo:margin-bottom="0in" style:contextual-spacing="false"/>
    </style:style>
    <style:style style:name="P50" style:family="paragraph" style:parent-style-name="Text_20_body" style:list-style-name="L26"/>
    <style:style style:name="P51" style:family="paragraph" style:parent-style-name="Text_20_body" style:list-style-name="L26">
      <style:paragraph-properties fo:margin-top="0in" fo:margin-bottom="0in" style:contextual-spacing="false"/>
    </style:style>
    <style:style style:name="P52" style:family="paragraph" style:parent-style-name="Text_20_body" style:list-style-name="L27"/>
    <style:style style:name="P53" style:family="paragraph" style:parent-style-name="Text_20_body" style:list-style-name="L27">
      <style:paragraph-properties fo:margin-top="0in" fo:margin-bottom="0in" style:contextual-spacing="false"/>
    </style:style>
    <style:style style:name="P54" style:family="paragraph" style:parent-style-name="Text_20_body" style:list-style-name="L28"/>
    <style:style style:name="P55" style:family="paragraph" style:parent-style-name="Text_20_body" style:list-style-name="L28">
      <style:paragraph-properties fo:margin-top="0in" fo:margin-bottom="0in" style:contextual-spacing="false"/>
    </style:style>
    <style:style style:name="P56" style:family="paragraph" style:parent-style-name="Text_20_body" style:list-style-name="L29"/>
    <style:style style:name="P57" style:family="paragraph" style:parent-style-name="Text_20_body" style:list-style-name="L29">
      <style:paragraph-properties fo:margin-top="0in" fo:margin-bottom="0in" style:contextual-spacing="false"/>
    </style:style>
    <style:style style:name="P58" style:family="paragraph" style:parent-style-name="Text_20_body" style:list-style-name="L30"/>
    <style:style style:name="P59" style:family="paragraph" style:parent-style-name="Text_20_body" style:list-style-name="L30">
      <style:paragraph-properties fo:margin-top="0in" fo:margin-bottom="0in" style:contextual-spacing="false"/>
    </style:style>
    <style:style style:name="P60" style:family="paragraph" style:parent-style-name="Text_20_body" style:list-style-name="L31"/>
    <style:style style:name="P61" style:family="paragraph" style:parent-style-name="Text_20_body" style:list-style-name="L32"/>
    <style:style style:name="P62" style:family="paragraph" style:parent-style-name="Text_20_body" style:list-style-name="L32">
      <style:paragraph-properties fo:margin-top="0in" fo:margin-bottom="0in" style:contextual-spacing="false"/>
    </style:style>
    <style:style style:name="P63" style:family="paragraph" style:parent-style-name="Text_20_body" style:list-style-name="L33"/>
    <style:style style:name="P64" style:family="paragraph" style:parent-style-name="Text_20_body" style:list-style-name="L33">
      <style:paragraph-properties fo:margin-top="0in" fo:margin-bottom="0in" style:contextual-spacing="false"/>
    </style:style>
    <style:style style:name="P65" style:family="paragraph" style:parent-style-name="Text_20_body" style:list-style-name="L34"/>
    <style:style style:name="P66" style:family="paragraph" style:parent-style-name="Text_20_body" style:list-style-name="L34">
      <style:paragraph-properties fo:margin-top="0in" fo:margin-bottom="0in" style:contextual-spacing="false"/>
    </style:style>
    <style:style style:name="P67" style:family="paragraph" style:parent-style-name="Text_20_body" style:list-style-name="L35"/>
    <style:style style:name="P68" style:family="paragraph" style:parent-style-name="Text_20_body" style:list-style-name="L35">
      <style:paragraph-properties fo:margin-top="0in" fo:margin-bottom="0in" style:contextual-spacing="false"/>
    </style:style>
    <style:style style:name="P69" style:family="paragraph" style:parent-style-name="Text_20_body" style:list-style-name="L36"/>
    <style:style style:name="P70" style:family="paragraph" style:parent-style-name="Text_20_body" style:list-style-name="L36">
      <style:paragraph-properties fo:margin-top="0in" fo:margin-bottom="0in" style:contextual-spacing="false"/>
    </style:style>
    <style:style style:name="P71" style:family="paragraph" style:parent-style-name="Text_20_body" style:list-style-name="L37"/>
    <style:style style:name="P72" style:family="paragraph" style:parent-style-name="Text_20_body" style:list-style-name="L37">
      <style:paragraph-properties fo:margin-top="0in" fo:margin-bottom="0in" style:contextual-spacing="false"/>
    </style:style>
    <style:style style:name="P73" style:family="paragraph" style:parent-style-name="Text_20_body" style:list-style-name="L38"/>
    <style:style style:name="P74" style:family="paragraph" style:parent-style-name="Text_20_body" style:list-style-name="L39"/>
    <style:style style:name="P75" style:family="paragraph" style:parent-style-name="Text_20_body" style:list-style-name="L39">
      <style:paragraph-properties fo:margin-top="0in" fo:margin-bottom="0in" style:contextual-spacing="false"/>
    </style:style>
    <style:style style:name="P76" style:family="paragraph" style:parent-style-name="Text_20_body" style:list-style-name="L40"/>
    <style:style style:name="P77" style:family="paragraph" style:parent-style-name="Text_20_body" style:list-style-name="L40">
      <style:paragraph-properties fo:margin-top="0in" fo:margin-bottom="0in" style:contextual-spacing="false"/>
    </style:style>
    <style:style style:name="P78" style:family="paragraph" style:parent-style-name="Text_20_body" style:list-style-name="L41"/>
    <style:style style:name="P79" style:family="paragraph" style:parent-style-name="Text_20_body" style:list-style-name="L41">
      <style:paragraph-properties fo:margin-top="0in" fo:margin-bottom="0in" style:contextual-spacing="false"/>
    </style:style>
    <style:style style:name="P80" style:family="paragraph" style:parent-style-name="Text_20_body" style:list-style-name="L42"/>
    <style:style style:name="P81" style:family="paragraph" style:parent-style-name="Text_20_body" style:list-style-name="L42">
      <style:paragraph-properties fo:margin-top="0in" fo:margin-bottom="0in" style:contextual-spacing="false"/>
    </style:style>
    <style:style style:name="P82" style:family="paragraph" style:parent-style-name="Text_20_body" style:list-style-name="L43"/>
    <style:style style:name="P83" style:family="paragraph" style:parent-style-name="Text_20_body" style:list-style-name="L43">
      <style:paragraph-properties fo:margin-top="0in" fo:margin-bottom="0in" style:contextual-spacing="false"/>
    </style:style>
    <style:style style:name="P84" style:family="paragraph" style:parent-style-name="Text_20_body" style:list-style-name="L44"/>
    <style:style style:name="P85" style:family="paragraph" style:parent-style-name="Text_20_body" style:list-style-name="L44">
      <style:paragraph-properties fo:margin-top="0in" fo:margin-bottom="0in" style:contextual-spacing="false"/>
    </style:style>
    <style:style style:name="P86" style:family="paragraph" style:parent-style-name="Text_20_body" style:list-style-name="L45"/>
    <style:style style:name="P87" style:family="paragraph" style:parent-style-name="Text_20_body" style:list-style-name="L45">
      <style:paragraph-properties fo:margin-top="0in" fo:margin-bottom="0in" style:contextual-spacing="false"/>
    </style:style>
    <style:style style:name="P88" style:family="paragraph" style:parent-style-name="Text_20_body" style:list-style-name="L46"/>
    <style:style style:name="P89" style:family="paragraph" style:parent-style-name="Text_20_body" style:list-style-name="L46">
      <style:paragraph-properties fo:margin-top="0in" fo:margin-bottom="0in" style:contextual-spacing="false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30 Phases Roadmap — Autonomous AI DevOps &amp; Code Architecture Auditor</text:h>
      <text:p text:style-name="Text_20_body">Hunde, this roadmap is structured like a real startup engineering plan.<text:line-break/>If you follow this properly, the project will look extremely professional on GitHub and in interviews.</text:p>
      <text:p text:style-name="Horizontal_20_Line"/>
      <text:h text:style-name="Heading_20_1" text:outline-level="1">Phase 1 — Vision &amp; System Planning</text:h>
      <text:p text:style-name="Text_20_body">Define:</text:p>
      <text:list text:style-name="L1">
        <text:list-item>
          <text:p text:style-name="P5">project goals </text:p>
        </text:list-item>
        <text:list-item>
          <text:p text:style-name="P5">target users </text:p>
        </text:list-item>
        <text:list-item>
          <text:p text:style-name="P5">core features </text:p>
        </text:list-item>
        <text:list-item>
          <text:p text:style-name="P5">architecture direction </text:p>
        </text:list-item>
        <text:list-item>
          <text:p text:style-name="P4">MVP scope </text:p>
        </text:list-item>
      </text:list>
      <text:p text:style-name="Text_20_body">Deliverables:</text:p>
      <text:list text:style-name="L2">
        <text:list-item>
          <text:p text:style-name="P7">project overview </text:p>
        </text:list-item>
        <text:list-item>
          <text:p text:style-name="P7">feature list </text:p>
        </text:list-item>
        <text:list-item>
          <text:p text:style-name="P6">architecture sketch </text:p>
        </text:list-item>
      </text:list>
      <text:p text:style-name="Text_20_body">Tools:</text:p>
      <text:list text:style-name="L3">
        <text:list-item>
          <text:p text:style-name="P9"><text:a xlink:type="simple" xlink:href="https://www.notion.so/?utm_source=chatgpt.com" office:target-frame-name="_blank" xlink:show="new" text:style-name="Internet_20_link" text:visited-style-name="Visited_20_Internet_20_Link">Notion</text:a> </text:p>
        </text:list-item>
        <text:list-item>
          <text:p text:style-name="P8"><text:a xlink:type="simple" xlink:href="https://excalidraw.com/?utm_source=chatgpt.com" office:target-frame-name="_blank" xlink:show="new" text:style-name="Internet_20_link" text:visited-style-name="Visited_20_Internet_20_Link">Excalidraw</text:a> </text:p>
        </text:list-item>
      </text:list>
      <text:p text:style-name="Horizontal_20_Line"/>
      <text:h text:style-name="Heading_20_1" text:outline-level="1">Phase 2 — Monorepo &amp; Environment Setup</text:h>
      <text:p text:style-name="Text_20_body">Create:</text:p>
      <text:section text:style-name="Sect1" text:name="code-block-viewer">
        <text:p text:style-name="P1"><text:span text:style-name="Source_20_Text">/frontend</text:span></text:p>
        <text:p text:style-name="Preformatted_20_Text"><text:span text:style-name="Source_20_Text">/backend</text:span></text:p>
        <text:p text:style-name="Preformatted_20_Text"><text:span text:style-name="Source_20_Text">/agents</text:span></text:p>
        <text:p text:style-name="Preformatted_20_Text"><text:span text:style-name="Source_20_Text">/infrastructure</text:span></text:p>
        <text:p text:style-name="P3"><text:span text:style-name="Source_20_Text">/docs</text:span></text:p>
      </text:section>
      <text:p text:style-name="Text_20_body">Setup:</text:p>
      <text:list text:style-name="L4">
        <text:list-item>
          <text:p text:style-name="P11">GitHub repo </text:p>
        </text:list-item>
        <text:list-item>
          <text:p text:style-name="P11">Python environment </text:p>
        </text:list-item>
        <text:list-item>
          <text:p text:style-name="P11">Next.js app </text:p>
        </text:list-item>
        <text:list-item>
          <text:p text:style-name="P11">linting </text:p>
        </text:list-item>
        <text:list-item>
          <text:p text:style-name="P10">formatting </text:p>
        </text:list-item>
      </text:list>
      <text:p text:style-name="Text_20_body">Tools:</text:p>
      <text:list text:style-name="L5">
        <text:list-item>
          <text:p text:style-name="P13"><text:a xlink:type="simple" xlink:href="https://github.com/?utm_source=chatgpt.com" office:target-frame-name="_blank" xlink:show="new" text:style-name="Internet_20_link" text:visited-style-name="Visited_20_Internet_20_Link"><text:soft-page-break/>GitHub</text:a> </text:p>
        </text:list-item>
        <text:list-item>
          <text:p text:style-name="P13"><text:a xlink:type="simple" xlink:href="https://nextjs.org/?utm_source=chatgpt.com" office:target-frame-name="_blank" xlink:show="new" text:style-name="Internet_20_link" text:visited-style-name="Visited_20_Internet_20_Link">Next.js</text:a> </text:p>
        </text:list-item>
        <text:list-item>
          <text:p text:style-name="P12"><text:a xlink:type="simple" xlink:href="https://fastapi.tiangolo.com/?utm_source=chatgpt.com" office:target-frame-name="_blank" xlink:show="new" text:style-name="Internet_20_link" text:visited-style-name="Visited_20_Internet_20_Link">FastAPI</text:a> </text:p>
        </text:list-item>
      </text:list>
      <text:p text:style-name="Horizontal_20_Line"/>
      <text:h text:style-name="Heading_20_1" text:outline-level="1">Phase 3 — Backend Core Architecture</text:h>
      <text:p text:style-name="Text_20_body">Build:</text:p>
      <text:list text:style-name="L6">
        <text:list-item>
          <text:p text:style-name="P15">modular FastAPI structure </text:p>
        </text:list-item>
        <text:list-item>
          <text:p text:style-name="P15">settings management </text:p>
        </text:list-item>
        <text:list-item>
          <text:p text:style-name="P15">dependency injection </text:p>
        </text:list-item>
        <text:list-item>
          <text:p text:style-name="P15">logging system </text:p>
        </text:list-item>
        <text:list-item>
          <text:p text:style-name="P14">config loader </text:p>
        </text:list-item>
      </text:list>
      <text:p text:style-name="Text_20_body">Goal:<text:line-break/>make backend scalable.</text:p>
      <text:p text:style-name="Horizontal_20_Line"/>
      <text:h text:style-name="Heading_20_1" text:outline-level="1">Phase 4 — PostgreSQL &amp; Database Design</text:h>
      <text:p text:style-name="Text_20_body">Design tables:</text:p>
      <text:list text:style-name="L7">
        <text:list-item>
          <text:p text:style-name="P17">users </text:p>
        </text:list-item>
        <text:list-item>
          <text:p text:style-name="P17">repositories </text:p>
        </text:list-item>
        <text:list-item>
          <text:p text:style-name="P17">scans </text:p>
        </text:list-item>
        <text:list-item>
          <text:p text:style-name="P17">agent_runs </text:p>
        </text:list-item>
        <text:list-item>
          <text:p text:style-name="P17">logs </text:p>
        </text:list-item>
        <text:list-item>
          <text:p text:style-name="P16">embeddings metadata </text:p>
        </text:list-item>
      </text:list>
      <text:p text:style-name="Text_20_body">Tools:</text:p>
      <text:list text:style-name="L8">
        <text:list-item>
          <text:p text:style-name="P19"><text:a xlink:type="simple" xlink:href="https://www.postgresql.org/?utm_source=chatgpt.com" office:target-frame-name="_blank" xlink:show="new" text:style-name="Internet_20_link" text:visited-style-name="Visited_20_Internet_20_Link">PostgreSQL</text:a> </text:p>
        </text:list-item>
        <text:list-item>
          <text:p text:style-name="P18"><text:a xlink:type="simple" xlink:href="https://www.sqlalchemy.org/?utm_source=chatgpt.com" office:target-frame-name="_blank" xlink:show="new" text:style-name="Internet_20_link" text:visited-style-name="Visited_20_Internet_20_Link">SQLAlchemy</text:a> </text:p>
        </text:list-item>
      </text:list>
      <text:p text:style-name="Horizontal_20_Line"/>
      <text:h text:style-name="Heading_20_1" text:outline-level="1">Phase 5 — Authentication System</text:h>
      <text:p text:style-name="Text_20_body">Implement:</text:p>
      <text:list text:style-name="L9">
        <text:list-item>
          <text:p text:style-name="P21">JWT auth </text:p>
        </text:list-item>
        <text:list-item>
          <text:p text:style-name="P21">refresh tokens </text:p>
        </text:list-item>
        <text:list-item>
          <text:p text:style-name="P21">GitHub OAuth </text:p>
        </text:list-item>
        <text:list-item>
          <text:p text:style-name="P20">protected APIs </text:p>
        </text:list-item>
      </text:list>
      <text:p text:style-name="Text_20_body">Goal:<text:line-break/>professional authentication flow.</text:p>
      <text:p text:style-name="Horizontal_20_Line"/>
      <text:h text:style-name="Heading_20_1" text:outline-level="1"><text:soft-page-break/>Phase 6 — GitHub Integration</text:h>
      <text:p text:style-name="Text_20_body">Connect repositories using:</text:p>
      <text:list text:style-name="L10">
        <text:list-item>
          <text:p text:style-name="P23">GitHub API </text:p>
        </text:list-item>
        <text:list-item>
          <text:p text:style-name="P23">webhook support </text:p>
        </text:list-item>
        <text:list-item>
          <text:p text:style-name="P22">repo cloning </text:p>
        </text:list-item>
      </text:list>
      <text:p text:style-name="Text_20_body">Features:</text:p>
      <text:list text:style-name="L11">
        <text:list-item>
          <text:p text:style-name="P25">import repositories </text:p>
        </text:list-item>
        <text:list-item>
          <text:p text:style-name="P25">list branches </text:p>
        </text:list-item>
        <text:list-item>
          <text:p text:style-name="P24">pull commits </text:p>
        </text:list-item>
      </text:list>
      <text:p text:style-name="Text_20_body">Tools:</text:p>
      <text:list text:style-name="L12">
        <text:list-item>
          <text:p text:style-name="P26"><text:a xlink:type="simple" xlink:href="https://docs.github.com/en/rest?utm_source=chatgpt.com" office:target-frame-name="_blank" xlink:show="new" text:style-name="Internet_20_link" text:visited-style-name="Visited_20_Internet_20_Link">GitHub REST API</text:a> </text:p>
        </text:list-item>
      </text:list>
      <text:p text:style-name="Horizontal_20_Line"/>
      <text:h text:style-name="Heading_20_1" text:outline-level="1">Phase 7 — Repository Ingestion Engine</text:h>
      <text:p text:style-name="Text_20_body">Build system that:</text:p>
      <text:list text:style-name="L13">
        <text:list-item>
          <text:p text:style-name="P28">clones repo </text:p>
        </text:list-item>
        <text:list-item>
          <text:p text:style-name="P28">scans folders </text:p>
        </text:list-item>
        <text:list-item>
          <text:p text:style-name="P28">extracts files </text:p>
        </text:list-item>
        <text:list-item>
          <text:p text:style-name="P27">stores metadata </text:p>
        </text:list-item>
      </text:list>
      <text:p text:style-name="Text_20_body">Important:<text:line-break/>support large repositories.</text:p>
      <text:p text:style-name="Horizontal_20_Line"/>
      <text:h text:style-name="Heading_20_1" text:outline-level="1">Phase 8 — AST &amp; Code Parsing Engine</text:h>
      <text:p text:style-name="Text_20_body">This is huge technically.</text:p>
      <text:p text:style-name="Text_20_body">Parse:</text:p>
      <text:list text:style-name="L14">
        <text:list-item>
          <text:p text:style-name="P30">Python </text:p>
        </text:list-item>
        <text:list-item>
          <text:p text:style-name="P30">JS/TS </text:p>
        </text:list-item>
        <text:list-item>
          <text:p text:style-name="P30">configs </text:p>
        </text:list-item>
        <text:list-item>
          <text:p text:style-name="P30">imports </text:p>
        </text:list-item>
        <text:list-item>
          <text:p text:style-name="P30">classes </text:p>
        </text:list-item>
        <text:list-item>
          <text:p text:style-name="P29">functions </text:p>
        </text:list-item>
      </text:list>
      <text:p text:style-name="Text_20_body">Tools:</text:p>
      <text:list text:style-name="L15">
        <text:list-item>
          <text:p text:style-name="P31"><text:a xlink:type="simple" xlink:href="https://tree-sitter.github.io/tree-sitter?utm_source=chatgpt.com" office:target-frame-name="_blank" xlink:show="new" text:style-name="Internet_20_link" text:visited-style-name="Visited_20_Internet_20_Link">Tree-sitter</text:a> </text:p>
        </text:list-item>
      </text:list>
      <text:p text:style-name="Text_20_body">Goal:<text:line-break/>understand code structurally.</text:p>
      <text:p text:style-name="Horizontal_20_Line"><text:soft-page-break/></text:p>
      <text:h text:style-name="Heading_20_1" text:outline-level="1">Phase 9 — Dependency Graph Generator</text:h>
      <text:p text:style-name="Text_20_body">Create architecture graph:</text:p>
      <text:section text:style-name="Sect1" text:name="Section1">
        <text:p text:style-name="P2"><text:bookmark text:name="code-block-viewer"/><text:span text:style-name="Source_20_Text">API -&gt; Service -&gt; Database</text:span></text:p>
      </text:section>
      <text:p text:style-name="Text_20_body">Features:</text:p>
      <text:list text:style-name="L16">
        <text:list-item>
          <text:p text:style-name="P33">imports map </text:p>
        </text:list-item>
        <text:list-item>
          <text:p text:style-name="P33">service relationships </text:p>
        </text:list-item>
        <text:list-item>
          <text:p text:style-name="P32">dependency visualization </text:p>
        </text:list-item>
      </text:list>
      <text:p text:style-name="Text_20_body">Frontend visualization starts here.</text:p>
      <text:p text:style-name="Horizontal_20_Line"/>
      <text:h text:style-name="Heading_20_1" text:outline-level="1">Phase 10 — Vector Database Setup</text:h>
      <text:p text:style-name="Text_20_body">Setup:</text:p>
      <text:list text:style-name="L17">
        <text:list-item>
          <text:p text:style-name="P35">Qdrant<text:line-break/>or </text:p>
        </text:list-item>
        <text:list-item>
          <text:p text:style-name="P34">pgvector </text:p>
        </text:list-item>
      </text:list>
      <text:p text:style-name="Text_20_body">Store:</text:p>
      <text:list text:style-name="L18">
        <text:list-item>
          <text:p text:style-name="P37">code embeddings </text:p>
        </text:list-item>
        <text:list-item>
          <text:p text:style-name="P37">docs embeddings </text:p>
        </text:list-item>
        <text:list-item>
          <text:p text:style-name="P36">architecture embeddings </text:p>
        </text:list-item>
      </text:list>
      <text:p text:style-name="Text_20_body">Tools:</text:p>
      <text:list text:style-name="L19">
        <text:list-item>
          <text:p text:style-name="P38"><text:a xlink:type="simple" xlink:href="https://qdrant.tech/?utm_source=chatgpt.com" office:target-frame-name="_blank" xlink:show="new" text:style-name="Internet_20_link" text:visited-style-name="Visited_20_Internet_20_Link">Qdrant</text:a> </text:p>
        </text:list-item>
      </text:list>
      <text:p text:style-name="Horizontal_20_Line"/>
      <text:h text:style-name="Heading_20_1" text:outline-level="1">Phase 11 — Embedding Pipeline</text:h>
      <text:p text:style-name="Text_20_body">Chunk:</text:p>
      <text:list text:style-name="L20">
        <text:list-item>
          <text:p text:style-name="P40">source code </text:p>
        </text:list-item>
        <text:list-item>
          <text:p text:style-name="P40">README </text:p>
        </text:list-item>
        <text:list-item>
          <text:p text:style-name="P40">docs </text:p>
        </text:list-item>
        <text:list-item>
          <text:p text:style-name="P39">configs </text:p>
        </text:list-item>
      </text:list>
      <text:p text:style-name="Text_20_body">Generate embeddings using Gemini/OpenAI embeddings.</text:p>
      <text:p text:style-name="Text_20_body">Goal:<text:line-break/>accurate semantic search.</text:p>
      <text:p text:style-name="Horizontal_20_Line"/>
      <text:h text:style-name="Heading_20_1" text:outline-level="1"><text:soft-page-break/>Phase 12 — Hybrid RAG Search</text:h>
      <text:p text:style-name="Text_20_body">Implement:</text:p>
      <text:list text:style-name="L21">
        <text:list-item>
          <text:p text:style-name="P42">dense search </text:p>
        </text:list-item>
        <text:list-item>
          <text:p text:style-name="P42">sparse search </text:p>
        </text:list-item>
        <text:list-item>
          <text:p text:style-name="P41">hybrid ranking </text:p>
        </text:list-item>
      </text:list>
      <text:p text:style-name="Text_20_body">Why:<text:line-break/>code syntax requires better retrieval than normal text.</text:p>
      <text:p text:style-name="Horizontal_20_Line"/>
      <text:h text:style-name="Heading_20_1" text:outline-level="1">Phase 13 — LangGraph Foundation</text:h>
      <text:p text:style-name="Text_20_body">Setup:</text:p>
      <text:list text:style-name="L22">
        <text:list-item>
          <text:p text:style-name="P44">state management </text:p>
        </text:list-item>
        <text:list-item>
          <text:p text:style-name="P44">nodes </text:p>
        </text:list-item>
        <text:list-item>
          <text:p text:style-name="P44">edges </text:p>
        </text:list-item>
        <text:list-item>
          <text:p text:style-name="P44">routing </text:p>
        </text:list-item>
        <text:list-item>
          <text:p text:style-name="P43">memory </text:p>
        </text:list-item>
      </text:list>
      <text:p text:style-name="Text_20_body">Tools:</text:p>
      <text:list text:style-name="L23">
        <text:list-item>
          <text:p text:style-name="P45"><text:a xlink:type="simple" xlink:href="https://www.langchain.com/langgraph?utm_source=chatgpt.com" office:target-frame-name="_blank" xlink:show="new" text:style-name="Internet_20_link" text:visited-style-name="Visited_20_Internet_20_Link">LangGraph</text:a> </text:p>
        </text:list-item>
      </text:list>
      <text:p text:style-name="Horizontal_20_Line"/>
      <text:h text:style-name="Heading_20_1" text:outline-level="1">Phase 14 — Auditor Agent</text:h>
      <text:p text:style-name="Text_20_body">Build first intelligent agent.</text:p>
      <text:p text:style-name="Text_20_body">Capabilities:</text:p>
      <text:list text:style-name="L24">
        <text:list-item>
          <text:p text:style-name="P47">detect bad architecture </text:p>
        </text:list-item>
        <text:list-item>
          <text:p text:style-name="P47">outdated packages </text:p>
        </text:list-item>
        <text:list-item>
          <text:p text:style-name="P47">duplicated code </text:p>
        </text:list-item>
        <text:list-item>
          <text:p text:style-name="P46">security issues </text:p>
        </text:list-item>
      </text:list>
      <text:p text:style-name="Text_20_body">This becomes your MVP AI.</text:p>
      <text:p text:style-name="Horizontal_20_Line"/>
      <text:h text:style-name="Heading_20_1" text:outline-level="1">Phase 15 — Rule Engine</text:h>
      <text:p text:style-name="Text_20_body">Add:</text:p>
      <text:list text:style-name="L25">
        <text:list-item>
          <text:p text:style-name="P49">architecture rules </text:p>
        </text:list-item>
        <text:list-item>
          <text:p text:style-name="P49">code quality rules </text:p>
        </text:list-item>
        <text:list-item>
          <text:p text:style-name="P48">scoring system </text:p>
        </text:list-item>
      </text:list>
      <text:p text:style-name="Text_20_body"><text:soft-page-break/>Example:</text:p>
      <text:section text:style-name="Sect1" text:name="Section2">
        <text:p text:style-name="P2"><text:bookmark text:name="code-block-viewer Copy 1"/><text:span text:style-name="Source_20_Text">Too many database calls in controller.</text:span></text:p>
      </text:section>
      <text:p text:style-name="Horizontal_20_Line"/>
      <text:h text:style-name="Heading_20_1" text:outline-level="1">Phase 16 — Repository Health Scoring</text:h>
      <text:p text:style-name="Text_20_body">Generate scores:</text:p>
      <text:list text:style-name="L26">
        <text:list-item>
          <text:p text:style-name="P51">maintainability </text:p>
        </text:list-item>
        <text:list-item>
          <text:p text:style-name="P51">security </text:p>
        </text:list-item>
        <text:list-item>
          <text:p text:style-name="P51">complexity </text:p>
        </text:list-item>
        <text:list-item>
          <text:p text:style-name="P50">architecture quality </text:p>
        </text:list-item>
      </text:list>
      <text:p text:style-name="Text_20_body">Frontend dashboard starts looking enterprise-level here.</text:p>
      <text:p text:style-name="Horizontal_20_Line"/>
      <text:h text:style-name="Heading_20_1" text:outline-level="1">Phase 17 — Researcher Agent</text:h>
      <text:p text:style-name="Text_20_body">Agent retrieves:</text:p>
      <text:list text:style-name="L27">
        <text:list-item>
          <text:p text:style-name="P53">docs </text:p>
        </text:list-item>
        <text:list-item>
          <text:p text:style-name="P53">RAG context </text:p>
        </text:list-item>
        <text:list-item>
          <text:p text:style-name="P52">framework recommendations </text:p>
        </text:list-item>
      </text:list>
      <text:p text:style-name="Text_20_body">Can explain:<text:line-break/>WHY issue exists.</text:p>
      <text:p text:style-name="Horizontal_20_Line"/>
      <text:h text:style-name="Heading_20_1" text:outline-level="1">Phase 18 — Web Search + Documentation Retrieval</text:h>
      <text:p text:style-name="Text_20_body">Add:</text:p>
      <text:list text:style-name="L28">
        <text:list-item>
          <text:p text:style-name="P55">framework docs ingestion </text:p>
        </text:list-item>
        <text:list-item>
          <text:p text:style-name="P54">online documentation retrieval </text:p>
        </text:list-item>
      </text:list>
      <text:p text:style-name="Text_20_body">Example:<text:line-break/>FastAPI docs<text:line-break/>Next.js docs<text:line-break/>LangGraph docs</text:p>
      <text:p text:style-name="Horizontal_20_Line"/>
      <text:h text:style-name="Heading_20_1" text:outline-level="1">Phase 19 — Coder Agent</text:h>
      <text:p text:style-name="Text_20_body">AI generates:</text:p>
      <text:list text:style-name="L29">
        <text:list-item>
          <text:p text:style-name="P57"><text:soft-page-break/>patches </text:p>
        </text:list-item>
        <text:list-item>
          <text:p text:style-name="P57">fixes </text:p>
        </text:list-item>
        <text:list-item>
          <text:p text:style-name="P57">optimizations </text:p>
        </text:list-item>
        <text:list-item>
          <text:p text:style-name="P56">tests </text:p>
        </text:list-item>
      </text:list>
      <text:p text:style-name="Text_20_body">This phase is very advanced.</text:p>
      <text:p text:style-name="Horizontal_20_Line"/>
      <text:h text:style-name="Heading_20_1" text:outline-level="1">Phase 20 — Sandbox Execution Environment</text:h>
      <text:p text:style-name="Text_20_body">CRITICAL phase.</text:p>
      <text:p text:style-name="Text_20_body">Build isolated Docker sandbox:</text:p>
      <text:list text:style-name="L30">
        <text:list-item>
          <text:p text:style-name="P59">run generated code </text:p>
        </text:list-item>
        <text:list-item>
          <text:p text:style-name="P59">execute tests safely </text:p>
        </text:list-item>
        <text:list-item>
          <text:p text:style-name="P58">avoid dangerous execution </text:p>
        </text:list-item>
      </text:list>
      <text:p text:style-name="Text_20_body">Tools:</text:p>
      <text:list text:style-name="L31">
        <text:list-item>
          <text:p text:style-name="P60"><text:a xlink:type="simple" xlink:href="https://www.docker.com/?utm_source=chatgpt.com" office:target-frame-name="_blank" xlink:show="new" text:style-name="Internet_20_link" text:visited-style-name="Visited_20_Internet_20_Link">Docker</text:a> </text:p>
        </text:list-item>
      </text:list>
      <text:p text:style-name="Horizontal_20_Line"/>
      <text:h text:style-name="Heading_20_1" text:outline-level="1">Phase 21 — Automated Testing Engine</text:h>
      <text:p text:style-name="Text_20_body">Run:</text:p>
      <text:list text:style-name="L32">
        <text:list-item>
          <text:p text:style-name="P62">unit tests </text:p>
        </text:list-item>
        <text:list-item>
          <text:p text:style-name="P62">linting </text:p>
        </text:list-item>
        <text:list-item>
          <text:p text:style-name="P62">formatting </text:p>
        </text:list-item>
        <text:list-item>
          <text:p text:style-name="P61">static analysis </text:p>
        </text:list-item>
      </text:list>
      <text:p text:style-name="Text_20_body">Tools:</text:p>
      <text:list text:style-name="L33">
        <text:list-item>
          <text:p text:style-name="P64">pytest </text:p>
        </text:list-item>
        <text:list-item>
          <text:p text:style-name="P64">eslint </text:p>
        </text:list-item>
        <text:list-item>
          <text:p text:style-name="P63">black </text:p>
        </text:list-item>
      </text:list>
      <text:p text:style-name="Horizontal_20_Line"/>
      <text:h text:style-name="Heading_20_1" text:outline-level="1">Phase 22 — Reviewer Agent</text:h>
      <text:p text:style-name="Text_20_body">Reviewer checks:</text:p>
      <text:list text:style-name="L34">
        <text:list-item>
          <text:p text:style-name="P66">test results </text:p>
        </text:list-item>
        <text:list-item>
          <text:p text:style-name="P66">architecture consistency </text:p>
        </text:list-item>
        <text:list-item>
          <text:p text:style-name="P66">hallucinations </text:p>
        </text:list-item>
        <text:list-item>
          <text:p text:style-name="P65">breaking changes </text:p>
        </text:list-item>
      </text:list>
      <text:p text:style-name="Text_20_body">Can reject bad code.</text:p>
      <text:p text:style-name="Text_20_body"><text:soft-page-break/>This creates feedback loops.</text:p>
      <text:p text:style-name="Horizontal_20_Line"/>
      <text:h text:style-name="Heading_20_1" text:outline-level="1">Phase 23 — Multi-Agent Feedback Loop</text:h>
      <text:p text:style-name="Text_20_body">Connect:</text:p>
      <text:section text:style-name="Sect1" text:name="Section3">
        <text:p text:style-name="P2"><text:bookmark text:name="code-block-viewer Copy 2"/><text:span text:style-name="Source_20_Text">Auditor -&gt; Researcher -&gt; Coder -&gt; Reviewer</text:span></text:p>
      </text:section>
      <text:p text:style-name="Text_20_body">Using LangGraph cycles.</text:p>
      <text:p text:style-name="Text_20_body">This is where project becomes truly “agentic.”</text:p>
      <text:p text:style-name="Horizontal_20_Line"/>
      <text:h text:style-name="Heading_20_1" text:outline-level="1">Phase 24 — Realtime Streaming System</text:h>
      <text:p text:style-name="Text_20_body">Implement:</text:p>
      <text:list text:style-name="L35">
        <text:list-item>
          <text:p text:style-name="P68">WebSockets </text:p>
        </text:list-item>
        <text:list-item>
          <text:p text:style-name="P68">live logs </text:p>
        </text:list-item>
        <text:list-item>
          <text:p text:style-name="P67">streaming updates </text:p>
        </text:list-item>
      </text:list>
      <text:p text:style-name="Text_20_body">Frontend terminal UI becomes alive.</text:p>
      <text:p text:style-name="Horizontal_20_Line"/>
      <text:h text:style-name="Heading_20_1" text:outline-level="1">Phase 25 — Next.js Dashboard UI</text:h>
      <text:p text:style-name="Text_20_body">Build:</text:p>
      <text:list text:style-name="L36">
        <text:list-item>
          <text:p text:style-name="P70">futuristic dashboard </text:p>
        </text:list-item>
        <text:list-item>
          <text:p text:style-name="P70">repo cards </text:p>
        </text:list-item>
        <text:list-item>
          <text:p text:style-name="P70">scan status </text:p>
        </text:list-item>
        <text:list-item>
          <text:p text:style-name="P69">architecture analytics </text:p>
        </text:list-item>
      </text:list>
      <text:p text:style-name="Text_20_body">Style:<text:line-break/>black + blue engineering UI.</text:p>
      <text:p text:style-name="Horizontal_20_Line"/>
      <text:h text:style-name="Heading_20_1" text:outline-level="1">Phase 26 — Architecture Visualization UI</text:h>
      <text:p text:style-name="Text_20_body">Build:</text:p>
      <text:list text:style-name="L37">
        <text:list-item>
          <text:p text:style-name="P72">interactive dependency graph </text:p>
        </text:list-item>
        <text:list-item>
          <text:p text:style-name="P72">node visualization </text:p>
        </text:list-item>
        <text:list-item>
          <text:p text:style-name="P71">service mapping </text:p>
        </text:list-item>
      </text:list>
      <text:p text:style-name="Text_20_body">Tools:</text:p>
      <text:list text:style-name="L38">
        <text:list-item>
          <text:p text:style-name="P73"><text:a xlink:type="simple" xlink:href="https://reactflow.dev/?utm_source=chatgpt.com" office:target-frame-name="_blank" xlink:show="new" text:style-name="Internet_20_link" text:visited-style-name="Visited_20_Internet_20_Link"><text:soft-page-break/>React Flow</text:a> </text:p>
        </text:list-item>
      </text:list>
      <text:p text:style-name="Text_20_body">This looks VERY impressive visually.</text:p>
      <text:p text:style-name="Horizontal_20_Line"/>
      <text:h text:style-name="Heading_20_1" text:outline-level="1">Phase 27 — AI Diff &amp; Pull Request UI</text:h>
      <text:p text:style-name="Text_20_body">Show:</text:p>
      <text:list text:style-name="L39">
        <text:list-item>
          <text:p text:style-name="P75">before/after code </text:p>
        </text:list-item>
        <text:list-item>
          <text:p text:style-name="P75">explanations </text:p>
        </text:list-item>
        <text:list-item>
          <text:p text:style-name="P75">AI reasoning </text:p>
        </text:list-item>
        <text:list-item>
          <text:p text:style-name="P74">PR preview </text:p>
        </text:list-item>
      </text:list>
      <text:p text:style-name="Text_20_body">Like mini GitHub review system.</text:p>
      <text:p text:style-name="Horizontal_20_Line"/>
      <text:h text:style-name="Heading_20_1" text:outline-level="1">Phase 28 — Background Workers &amp; Scalability</text:h>
      <text:p text:style-name="Text_20_body">Setup:</text:p>
      <text:list text:style-name="L40">
        <text:list-item>
          <text:p text:style-name="P77">Celery </text:p>
        </text:list-item>
        <text:list-item>
          <text:p text:style-name="P77">Redis queues </text:p>
        </text:list-item>
        <text:list-item>
          <text:p text:style-name="P76">async tasks </text:p>
        </text:list-item>
      </text:list>
      <text:p text:style-name="Text_20_body">Needed for:</text:p>
      <text:list text:style-name="L41">
        <text:list-item>
          <text:p text:style-name="P79">repo scanning </text:p>
        </text:list-item>
        <text:list-item>
          <text:p text:style-name="P79">embeddings </text:p>
        </text:list-item>
        <text:list-item>
          <text:p text:style-name="P78">long AI workflows </text:p>
        </text:list-item>
      </text:list>
      <text:p text:style-name="Horizontal_20_Line"/>
      <text:h text:style-name="Heading_20_1" text:outline-level="1">Phase 29 — Deployment &amp; DevOps</text:h>
      <text:p text:style-name="Text_20_body">Deploy:</text:p>
      <text:list text:style-name="L42">
        <text:list-item>
          <text:p text:style-name="P81">frontend </text:p>
        </text:list-item>
        <text:list-item>
          <text:p text:style-name="P81">backend </text:p>
        </text:list-item>
        <text:list-item>
          <text:p text:style-name="P81">database </text:p>
        </text:list-item>
        <text:list-item>
          <text:p text:style-name="P81">vector DB </text:p>
        </text:list-item>
        <text:list-item>
          <text:p text:style-name="P80">workers </text:p>
        </text:list-item>
      </text:list>
      <text:p text:style-name="Text_20_body">Use:</text:p>
      <text:list text:style-name="L43">
        <text:list-item>
          <text:p text:style-name="P83">Docker Compose </text:p>
        </text:list-item>
        <text:list-item>
          <text:p text:style-name="P83">CI/CD </text:p>
        </text:list-item>
        <text:list-item>
          <text:p text:style-name="P82">cloud hosting </text:p>
        </text:list-item>
      </text:list>
      <text:p text:style-name="Text_20_body"><text:soft-page-break/>Tools:</text:p>
      <text:list text:style-name="L44">
        <text:list-item>
          <text:p text:style-name="P85"><text:a xlink:type="simple" xlink:href="https://vercel.com/?utm_source=chatgpt.com" office:target-frame-name="_blank" xlink:show="new" text:style-name="Internet_20_link" text:visited-style-name="Visited_20_Internet_20_Link">Vercel</text:a> </text:p>
        </text:list-item>
        <text:list-item>
          <text:p text:style-name="P85"><text:a xlink:type="simple" xlink:href="https://railway.app/?utm_source=chatgpt.com" office:target-frame-name="_blank" xlink:show="new" text:style-name="Internet_20_link" text:visited-style-name="Visited_20_Internet_20_Link">Railway</text:a> </text:p>
        </text:list-item>
        <text:list-item>
          <text:p text:style-name="P84"><text:a xlink:type="simple" xlink:href="https://render.com/?utm_source=chatgpt.com" office:target-frame-name="_blank" xlink:show="new" text:style-name="Internet_20_link" text:visited-style-name="Visited_20_Internet_20_Link">Render</text:a> </text:p>
        </text:list-item>
      </text:list>
      <text:p text:style-name="Horizontal_20_Line"/>
      <text:h text:style-name="Heading_20_1" text:outline-level="1">Phase 30 — Production Polish &amp; Portfolio Preparation</text:h>
      <text:p text:style-name="Text_20_body">Final polish:</text:p>
      <text:list text:style-name="L45">
        <text:list-item>
          <text:p text:style-name="P87">README </text:p>
        </text:list-item>
        <text:list-item>
          <text:p text:style-name="P87">screenshots </text:p>
        </text:list-item>
        <text:list-item>
          <text:p text:style-name="P87">architecture diagrams </text:p>
        </text:list-item>
        <text:list-item>
          <text:p text:style-name="P87">demo videos </text:p>
        </text:list-item>
        <text:list-item>
          <text:p text:style-name="P87">system design docs </text:p>
        </text:list-item>
        <text:list-item>
          <text:p text:style-name="P86">API docs </text:p>
        </text:list-item>
      </text:list>
      <text:p text:style-name="Text_20_body">Add:</text:p>
      <text:list text:style-name="L46">
        <text:list-item>
          <text:p text:style-name="P89">animated landing page </text:p>
        </text:list-item>
        <text:list-item>
          <text:p text:style-name="P89">professional branding </text:p>
        </text:list-item>
        <text:list-item>
          <text:p text:style-name="P88">case study </text:p>
        </text:list-item>
      </text:list>
      <text:p text:style-name="Text_20_body">This phase is VERY important for impressing recruiters.</text:p>
      <text:p text:style-name="Horizontal_20_Line"/>
      <text:h text:style-name="Heading_20_1" text:outline-level="1">Final Architecture Vision</text:h>
      <text:p text:style-name="Text_20_body">At the end, your system becomes:</text:p>
      <text:section text:style-name="Sect1" text:name="Section4">
        <text:p text:style-name="P1"><text:bookmark text:name="code-block-viewer Copy 3"/><text:span text:style-name="Source_20_Text">GitHub Repo</text:span></text:p>
        <text:p text:style-name="Preformatted_20_Text"><text:span text:style-name="Source_20_Text"><text:s text:c="6"/>↓</text:span></text:p>
        <text:p text:style-name="Preformatted_20_Text"><text:span text:style-name="Source_20_Text">Repository Ingestion</text:span></text:p>
        <text:p text:style-name="Preformatted_20_Text"><text:span text:style-name="Source_20_Text"><text:s text:c="6"/>↓</text:span></text:p>
        <text:p text:style-name="Preformatted_20_Text"><text:span text:style-name="Source_20_Text">AST Analysis</text:span></text:p>
        <text:p text:style-name="Preformatted_20_Text"><text:span text:style-name="Source_20_Text"><text:s text:c="6"/>↓</text:span></text:p>
        <text:p text:style-name="Preformatted_20_Text"><text:span text:style-name="Source_20_Text">Vector Database (RAG)</text:span></text:p>
        <text:p text:style-name="Preformatted_20_Text"><text:span text:style-name="Source_20_Text"><text:s text:c="6"/>↓</text:span></text:p>
        <text:p text:style-name="Preformatted_20_Text"><text:span text:style-name="Source_20_Text">LangGraph Multi-Agent System</text:span></text:p>
        <text:p text:style-name="Preformatted_20_Text"><text:span text:style-name="Source_20_Text"><text:s text:c="6"/>↓</text:span></text:p>
        <text:p text:style-name="Preformatted_20_Text"><text:span text:style-name="Source_20_Text">Autonomous Fix Generation</text:span></text:p>
        <text:p text:style-name="Preformatted_20_Text"><text:span text:style-name="Source_20_Text"><text:s text:c="6"/>↓</text:span></text:p>
        <text:p text:style-name="Preformatted_20_Text"><text:span text:style-name="Source_20_Text">Sandbox Testing</text:span></text:p>
        <text:p text:style-name="Preformatted_20_Text"><text:span text:style-name="Source_20_Text"><text:s text:c="6"/>↓</text:span></text:p>
        <text:p text:style-name="Preformatted_20_Text"><text:span text:style-name="Source_20_Text">Reviewer Validation</text:span></text:p>
        <text:p text:style-name="Preformatted_20_Text"><text:span text:style-name="Source_20_Text"><text:s text:c="6"/>↓</text:span></text:p>
        <text:p text:style-name="P3"><text:span text:style-name="Source_20_Text">PR / Dashboard Visualization</text:span></text:p>
      </text:section>
      <text:p text:style-name="Horizontal_20_Lin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9T08:27:47.609466876</meta:creation-date>
    <dc:date>2026-05-29T08:28:26.786719774</dc:date>
    <meta:editing-duration>PT40S</meta:editing-duration>
    <meta:editing-cycles>1</meta:editing-cycles>
    <meta:document-statistic meta:table-count="0" meta:image-count="0" meta:object-count="0" meta:page-count="10" meta:paragraph-count="285" meta:word-count="849" meta:character-count="5215" meta:non-whitespace-character-count="4572"/>
    <meta:generator>LibreOffice/24.2.7.2$Linux_X86_64 LibreOffice_project/420$Build-2</meta:generator>
  </office:meta>
</office:document-meta>
</file>